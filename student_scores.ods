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Hours</text:p>
          </table:table-cell>
          <table:table-cell office:value-type="string" table:style-name="ce1">
            <text:p>Scores</text:p>
          </table:table-cell>
          <table:table-cell table:number-columns-repeated="16382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float" office:value="5.0999999999999996" table:style-name="ce1">
            <text:p>5.1</text:p>
          </table:table-cell>
          <table:table-cell office:value-type="float" office:value="47" table:style-name="ce1">
            <text:p>47</text:p>
          </table:table-cell>
          <table:table-cell table:number-columns-repeated="16382"/>
        </table:table-row>
        <table:table-row table:style-name="ro1">
          <table:table-cell office:value-type="float" office:value="3.2" table:style-name="ce1">
            <text:p>3.2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float" office:value="8.5" table:style-name="ce1">
            <text:p>8.5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9.1999999999999993" table:style-name="ce1">
            <text:p>9.2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8.3000000000000007" table:style-name="ce1">
            <text:p>8.3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float" office:value="2.7" table:style-name="ce1">
            <text:p>2.7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float" office:value="7.7" table:style-name="ce1">
            <text:p>7.7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float" office:value="5.9" table:style-name="ce1">
            <text:p>5.9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41" table:style-name="ce1">
            <text:p>41</text:p>
          </table:table-cell>
          <table:table-cell table:number-columns-repeated="16382"/>
        </table:table-row>
        <table:table-row table:style-name="ro1">
          <table:table-cell office:value-type="float" office:value="3.3" table:style-name="ce1">
            <text:p>3.3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8.9" table:style-name="ce1">
            <text:p>8.9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float" office:value="7.4" table:style-name="ce1">
            <text:p>7.4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2.7" table:style-name="ce1">
            <text:p>2.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3.8" table:style-name="ce1">
            <text:p>3.8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float" office:value="6.9" table:style-name="ce1">
            <text:p>6.9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06</meta:generator>
    <dc:creator>X</dc:creator>
    <meta:creation-date>2026-04-16T06:46:33Z</meta:creation-date>
    <dc:date>2026-04-16T09:00:00Z</dc:date>
  </office:meta>
</office:document-meta>
</file>